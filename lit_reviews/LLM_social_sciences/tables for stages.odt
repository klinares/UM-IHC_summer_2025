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6813in"/>
    </style:style>
    <style:style style:name="Table1.B" style:family="table-column">
      <style:table-column-properties style:column-width="3.24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3.6771in"/>
    </style:style>
    <style:style style:name="Table2.B" style:family="table-column">
      <style:table-column-properties style:column-width="3.24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3.9903in"/>
    </style:style>
    <style:style style:name="Table3.B" style:family="table-column">
      <style:table-column-properties style:column-width="2.934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3.8688in"/>
    </style:style>
    <style:style style:name="Table4.B" style:family="table-column">
      <style:table-column-properties style:column-width="3.056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paragraph-rsid="001e6d6a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T1" style:family="text">
      <style:text-properties officeooo:rsid="001e6d6a"/>
    </style:style>
    <style:style style:name="T2" style:family="text">
      <style:text-properties fo:font-weight="bold" officeooo:rsid="001cca6e" style:font-weight-asian="bold" style:font-weight-complex="bold"/>
    </style:style>
    <style:style style:name="T3" style:family="text">
      <style:text-properties officeooo:rsid="002045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's <text:span text:style-name="T1">Role in</text:span> the Four-Stage Response Process Model</text:h>
      <text:h text:style-name="Heading_20_3" text:outline-level="3"><text:span text:style-name="Strong_20_Emphasis">Comprehension Stag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How AI Disrupts</text:p>
            </table:table-cell>
            <table:table-cell table:style-name="Table1.A1" office:value-type="string">
              <text:p text:style-name="Table_20_Heading">How AI Enhanc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agmatic breakdown</text:span>: AI lacks cultural knowledge and conversational norms (Wong et al., 2025)</text:p>
          </table:table-cell>
          <table:table-cell table:style-name="Table1.A1" office:value-type="string">
            <text:p text:style-name="Table_20_Contents"><text:span text:style-name="Strong_20_Emphasis">Multilingual support</text:span>: Real-time translation and adaptation (Metheney &amp; Yehle, 2024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tributed comprehension</text:span>: Understanding fragmented across human, AI, and interviewer agents</text:p>
          </table:table-cell>
          <table:table-cell table:style-name="Table1.A1" office:value-type="string">
            <text:p text:style-name="Table_20_Contents"><text:span text:style-name="Strong_20_Emphasis">Standardized delivery</text:span>: Eliminates interviewer <text:span text:style-name="T1">effect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hnical language bias</text:span>: AI overly technical and inconsistent (Wong et al., 2025)</text:p>
          </table:table-cell>
          <table:table-cell table:style-name="Table1.A1" office:value-type="string">
            <text:p text:style-name="Table_20_Contents"><text:span text:style-name="Strong_20_Emphasis">Instant clarification</text:span>: On-demand definitions without judgment</text:p>
          </table:table-cell>
        </table:table-row>
      </table:table>
      <text:h text:style-name="Heading_20_3" text:outline-level="3"><text:span text:style-name="Strong_20_Emphasis">Retrieval Stage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How AI Disrupts</text:p>
            </table:table-cell>
            <table:table-cell table:style-name="Table2.A1" office:value-type="string">
              <text:p text:style-name="Table_20_Heading">How AI Enhanc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seudo-retrieval</text:span>: AI accesses training data, not <text:span text:style-name="T1">autobiographic</text:span> memory (Tai et al., 2024)</text:p>
          </table:table-cell>
          <table:table-cell table:style-name="Table2.A1" office:value-type="string">
            <text:p text:style-name="Table_20_Contents"><text:span text:style-name="Strong_20_Emphasis">Memory prompting</text:span>: Personalized cues to aid recal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ss of authenticity</text:span>: Responses reflect corpus patterns, not lived <text:span text:style-name="T1">encoded </text:span>experience</text:p>
          </table:table-cell>
          <table:table-cell table:style-name="Table2.A1" office:value-type="string">
            <text:p text:style-name="Table_20_Contents"><text:span text:style-name="Strong_20_Emphasis">Cognitive load reduction</text:span>: Breaks complex recall into manageable par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emory contamination</text:span>: Respondents incorporate AI-suggested information</text:p>
          </table:table-cell>
          <table:table-cell table:style-name="Table2.A1" office:value-type="string">
            <text:p text:style-name="Table_20_Contents"><text:span text:style-name="Strong_20_Emphasis">Documentation access</text:span>: Helps verify memories with personal records <text:span text:style-name="T1">from event calendars</text:span></text:p>
          </table:table-cell>
        </table:table-row>
      </table:table>
      <text:h text:style-name="Heading_20_3" text:outline-level="3"><text:span text:style-name="Strong_20_Emphasis">Judgment Stage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How AI Disrupts</text:p>
            </table:table-cell>
            <table:table-cell table:style-name="Table3.A1" office:value-type="string">
              <text:p text:style-name="Table_20_Heading">How AI Enhanc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tatistical regularities</text:span>: AI smooths idiosyncratic individual evaluations (Mellon et al., 2024)</text:p>
          </table:table-cell>
          <table:table-cell table:style-name="Table3.A1" office:value-type="string">
            <text:p text:style-name="Table_20_Contents"><text:span text:style-name="Strong_20_Emphasis">Computational support</text:span>: Assists <text:span text:style-name="T1">Rs </text:span>with c<text:span text:style-name="T1">omputing more accurate estimates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omogenization</text:span>: Responses become more uniform (Zhang et al., 2025)</text:p>
          </table:table-cell>
          <table:table-cell table:style-name="Table3.A1" office:value-type="string">
            <text:p text:style-name="P1"><text:span text:style-name="Strong_20_Emphasis"><text:span text:style-name="T2">Decomposing</text:span></text:span>: <text:span text:style-name="T1">Breakdown behavioral Qs for older Rs to discourage overestimating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raining data bias</text:span>: Embeds societal biases rather than individual attitudes</text:p>
          </table:table-cell>
          <table:table-cell table:style-name="Table3.A1" office:value-type="string">
            <text:p text:style-name="Table_20_Contents"><text:span text:style-name="Strong_20_Emphasis"><text:span text:style-name="T3">Measuring Relative Frequencies</text:span></text:span>: <text:span text:style-name="T3">Enable the use of heuristics for rare events</text:span> </text:p>
          </table:table-cell>
        </table:table-row>
      </table:table>
      <text:h text:style-name="Heading_20_3" text:outline-level="3"><text:span text:style-name="Strong_20_Emphasis">Response Stage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How AI Disrupts</text:p>
            </table:table-cell>
            <table:table-cell table:style-name="Table4.A1" office:value-type="string">
              <text:p text:style-name="Table_20_Heading">How AI Enhances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mbiguous authenticity</text:span>: Unclear if responses are human or AI-generated (AAPOR, 2024)</text:p>
          </table:table-cell>
          <table:table-cell table:style-name="Table4.A1" office:value-type="string">
            <text:p text:style-name="Table_20_Contents"><text:span text:style-name="Strong_20_Emphasis">Reduced social desirability</text:span>: Removes interviewer presence effect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ystematic bias</text:span>: AI favors "acceptable" responses from training corpus</text:p>
          </table:table-cell>
          <table:table-cell table:style-name="Table4.A1" office:value-type="string">
            <text:p text:style-name="Table_20_Contents"><text:span text:style-name="Strong_20_Emphasis">Privacy enhancement</text:span>: Increases disclosure of sensitive informatio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asurement error</text:span>: Traditional psychometrics fail with human-AI collaboration</text:p>
          </table:table-cell>
          <table:table-cell table:style-name="Table4.A1" office:value-type="string">
            <text:p text:style-name="Table_20_Contents"><text:span text:style-name="Strong_20_Emphasis">Real-time quality checks</text:span>: Detects satisficing and speeding</text:p>
          </table:table-cell>
        </table:table-row>
      </table:table>
      <text:h text:style-name="Heading_20_3" text:outline-level="3"><text:span text:style-name="Strong_20_Emphasis">Cascading Effects</text:span></text:h>
      <text:list text:style-name="L1">
        <text:list-item>
          <text:p text:style-name="P2"><text:span text:style-name="Strong_20_Emphasis">Context effects</text:span>: AI's perfect recall amplifies consistency pressure beyond human norms (Tourangeau &amp; Rasinski, 1988) </text:p>
        </text:list-item>
        <text:list-item>
          <text:p text:style-name="P2"><text:span text:style-name="Strong_20_Emphasis">Temporal dynamics</text:span>: AI's constant performance masks human fatigue patterns </text:p>
        </text:list-item>
        <text:list-item>
          <text:p text:style-name="P3"><text:span text:style-name="Strong_20_Emphasis">Distributed cognition</text:span>: Violates assumption of unitary respondent (Tourangeau et al., 200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10:18:06.717752000</meta:creation-date>
    <dc:date>2025-07-12T08:22:05.949636100</dc:date>
    <meta:editing-duration>PT4H49M17S</meta:editing-duration>
    <meta:editing-cycles>2</meta:editing-cycles>
    <meta:generator>LibreOffice/25.2.4.3$Windows_X86_64 LibreOffice_project/33e196637044ead23f5c3226cde09b47731f7e27</meta:generator>
    <meta:document-statistic meta:table-count="4" meta:image-count="0" meta:object-count="0" meta:page-count="1" meta:paragraph-count="41" meta:word-count="301" meta:character-count="2327" meta:non-whitespace-character-count="2067"/>
  </office:meta>
</office:document-meta>
</file>