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Standard">
      <style:text-properties officeooo:paragraph-rsid="0002082e"/>
    </style:style>
    <style:style style:name="P4" style:family="paragraph" style:parent-style-name="Standard">
      <style:text-properties fo:font-style="italic"/>
    </style:style>
    <style:style style:name="P5" style:family="paragraph" style:parent-style-name="List_20_1" style:list-style-name="">
      <style:paragraph-properties fo:margin-left="0in" fo:text-indent="0in" style:auto-text-indent="false"/>
      <style:text-properties officeooo:paragraph-rsid="0002082e"/>
    </style:style>
    <style:style style:name="P6" style:family="paragraph" style:parent-style-name="Standard">
      <style:text-properties officeooo:paragraph-rsid="0003ca61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Barari, S., &amp; Lerner, J. (2024, November 25). </text:span><text:span text:style-name="T2">Large Language Models and Survey Research: A Recap</text:span><text:span text:style-name="T1">. AAPOR. </text:span><text:a xlink:type="simple" xlink:href="https://aapor.org/newsletters/large-language-models-and-survey-research-a-recap/" text:style-name="Internet_20_link" text:visited-style-name="Visited_20_Internet_20_Link"><text:span text:style-name="T1">https://aapor.org/newsletters/large-language-models-and-survey-research-a-recap/</text:span></text:a><text:span text:style-name="T1">.</text:span></text:p>
      <text:p text:style-name="P2">Brown, N., &amp; Siegler, R. (1993). Metrics and mappings: A framework for understanding real- world quantitative estimation. Psychological Review, 100, 311-325.</text:p>
      <text:p text:style-name="P2">Conway, M.A. (2005) Memory and the self. Journal of Memory and Language 53, 594–628.</text:p>
      <text:p text:style-name="P2">Conrad, F. G., Brown, N. R. &amp; Cashman, E. R. (1998). Strategies for estimating</text:p>
      <text:p text:style-name="P2">behavioural frequency in survey interviews. Memory, 6, 339-366.</text:p>
      <text:p text:style-name="Standard">Conrad, F.G., Schober, M.F., &amp; Schwarz, N. (2014). Pragmatic processes in survey interviewing. In T. Holtgraves (Ed.), Oxford Handbook of Language and Social Psychology (pp. 420-437). Oxford: Oxford University of Press.</text:p>
      <text:p text:style-name="Standard"/>
      <text:p text:style-name="Standard">Fisher, R. &amp; Quigley, K. (1992). Applying cognitive theory in public health investigations: Enhancing food recall with the cognitive interview. In J. M. Tanur (ed), Questions about questions: Inquiries into the cognitive bases of surveys. New York: Sage (154-169).</text:p>
      <text:p text:style-name="Standard"/>
      <text:p text:style-name="P3">Jacobsen, R. M., Cox, S. R., Griggio, C. F., &amp; Van Berkel, N. (2025). Chatbots for data collection in surveys: A comparison of four theory-based interview probes. In Proceedings of the 2025 CHI Conference on Human Factors in Computing Systems (pp. 1-21).</text:p>
      <text:p text:style-name="P3"/>
      <text:p text:style-name="P3">Meem, F. N., Smith, J., &amp; Johnson, B. (2024, September). Challenges and Opportunities for Survey Research in the Age of Generative AI: An Experience Report. In <text:span text:style-name="T3">2024 IEEE Symposium on Visual Languages and Human-Centric Computing (VL/HCC)</text:span> (pp. 423-428). IEEE.</text:p>
      <text:p text:style-name="P3"/>
      <text:p text:style-name="P3">Mellon, J., Bailey, J., Scott, R., Breckwoldt, J., Miori, M., &amp; Schmedeman, P. (2024). Do AIs know what the most important issue is? Using language models to code open-text social survey responses at scale. Sociological Methods &amp; Research, 53(1), 123-156.</text:p>
      <text:p text:style-name="P3"/>
      <text:p text:style-name="P3">Metheney, E. A., &amp; Yehle, L. (2024). Exploring the Potential Role of Generative AI in the TRAPD Procedure for Survey Translation. <text:span text:style-name="T3">arXiv preprint arXiv:2411.14472</text:span>.</text:p>
      <text:p text:style-name="P3"/>
      <text:p text:style-name="Standard">Minaee, S., Mikolov, T., Nikzad, N., Chenaghlu, M., Socher, R., Amatriain, X., &amp; Gao, J. (2024). Large language models: A survey <text:a xlink:type="simple" xlink:href="arxiv:2402.06196" text:style-name="Internet_20_link" text:visited-style-name="Visited_20_Internet_20_Link"><text:span text:style-name="T4">arXiv:2402.06196</text:span></text:a><text:span text:style-name="T4">. </text:span></text:p>
      <text:p text:style-name="P4"/>
      <text:p text:style-name="P4">Lee, L., Brittingham, A., Tourangeau, R., Willis, G., Ching, P., Jobe, J. &amp; Black, S. (1999). Are reporting errors due to encoding limitations or retrieval failure? Surveys of child vaccination as a case study. Applied Cognitive Psychology, 13, 43-63.</text:p>
      <text:p text:style-name="Standard"/>
      <text:p text:style-name="Standard">Lerner, J. (2024, October). <text:span text:style-name="T4">The Promise &amp; Pitfalls of AI-Augmented Survey Research</text:span>. NORC. <text:a xlink:type="simple" xlink:href="https://www.norc.org/research/library/promise-pitfalls-ai-augmented-survey-research.html" text:style-name="Internet_20_link" text:visited-style-name="Visited_20_Internet_20_Link">https://www.norc.org/research/library/promise-pitfalls-ai-augmented-survey-research.html</text:a>.</text:p>
      <text:p text:style-name="Standard"/>
      <text:p text:style-name="Standard">Lind, L.H., Schober, M.F., Conrad, F.G., &amp; Reichert, H. (2013). Why do survey respondents disclose more when computers ask the questions? Public Opinion Quarterly, 77 888-935.</text:p>
      <text:p text:style-name="Standard"/>
      <text:p text:style-name="P3"><text:soft-page-break/>Padgett, Z., Maiorino, A., &amp; Gutierrez, S. (2024). Evaluating the quality of questionnaires created with SurveyMonkey's Build with AI. Paper presented at AAPOR Conference, Atlanta, GA.</text:p>
      <text:p text:style-name="Standard"/>
      <text:p text:style-name="P3">Schaeffer, N.C &amp; Maynard, D.W. (2008). The contemporary standardized survey interview for social research. In Conrad, F.G. and Schober, M.F. (Eds) Envisioning the Survey Interview of the Future (pp. 31-57). Hoboken, NJ: John Wiley &amp; Sons.</text:p>
      <text:p text:style-name="P3"/>
      <text:p text:style-name="P3">Schwarz, N., Oyserman, D., &amp; Peytcheva, E. (2010). Cognition, communication, and culture: Implications for the survey response process. Survey methods in multinational, multiregional and multicultural contexts, 177-190.</text:p>
      <text:p text:style-name="P3"/>
      <text:p text:style-name="P3">Suchman, L. A. (2007). <text:span text:style-name="T4">Human-machine reconfigurations: Plans and situated actions</text:span>. Cambridge university press.</text:p>
      <text:p text:style-name="P3"/>
      <text:p text:style-name="P3">Tai, R. H., Bentley, L. R., Xia, X., Sitt, J. M., Fankhauser, S. C., Chicas-Mosier, A. M., &amp; Monteith, B. G. (2024). An examination of the use of large language models to aid analysis of textual data. International Journal of Qualitative Methods, 23, Article 16094069241231168.</text:p>
      <text:p text:style-name="Standard"/>
      <text:p text:style-name="P5">Terheyden, J.H., Pielka, M., Schneider, T. <text:span text:style-name="T3">et al.</text:span> A new generation of patient-reported outcome measures with large language models. <text:span text:style-name="T3">J Patient Rep Outcomes</text:span> <text:span text:style-name="T5">9</text:span>, 34 (2025). <text:a xlink:type="simple" xlink:href="https://doi.org/10.1186/s41687-025-00867-4" text:style-name="Internet_20_link" text:visited-style-name="Visited_20_Internet_20_Link"><text:span text:style-name="Internet_20_link">https://doi.org/10.1186/s41687-025-00867-4</text:span></text:a> </text:p>
      <text:p text:style-name="Standard"/>
      <text:p text:style-name="P6">Tourangeau, R., Rips, L. J., &amp; Rasinski, K. (2000). The psychology of survey response. Cambridge University Press.</text:p>
      <text:p text:style-name="P6"/>
      <text:p text:style-name="P3">Wong, L. Z., Juraimi, S. A., Tan, Y. Z., Loh, S. B., Chong, M. F., Bhattacharya, P., &amp; Pink, A. E. (2025). The AI interviewer: Exploring the use of conversational AI-enabled chatbots in qualitative data collection. Available at SSRN 5194078. </text:p>
      <text:p text:style-name="P3"/>
      <text:p text:style-name="P3">Wuttke, A., Aßenmacher, M., Klamm, C., Lang, M. M., Würschinger, Q., &amp; Kreuter, F. (2024). AI conversational interviewing: Transforming surveys with LLMs as adaptive interviewers. arXiv preprint arXiv:2410.01824.</text:p>
      <text:p text:style-name="P3"/>
      <text:p text:style-name="P3">Xiao, Z., Yuan, X., Liao, V. Q., Abdelghani, R., &amp; Oudeyer, P. Y. (2023). Supporting qualitative analysis with large language models: Combining codebook with GPT-3 for deductive coding. In Proceedings of the 28th International Conference on Intelligent User Interfaces (pp. 75-78). ACM.</text:p>
      <text:p text:style-name="P3"/>
      <text:p text:style-name="P3">Zhang, S., Xu, J., &amp; Alvero, A. J. (2025). Generative AI meets open-ended survey responses: Research participant use of AI and homogenization. Sociological Methods &amp; Research, Article 0049124125132713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1" style:display-name="List 1" style:family="paragraph" style:parent-style-name="Standard" style:list-style-name="WWNum1" style:class="list">
      <style:paragraph-properties fo:margin-top="0in" fo:margin-bottom="0.111in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09:34:55.843053700</meta:creation-date>
    <dc:date>2025-09-15T10:03:52.116161600</dc:date>
    <meta:editing-duration>PT5M5S</meta:editing-duration>
    <meta:editing-cycles>1</meta:editing-cycles>
    <meta:document-statistic meta:table-count="0" meta:image-count="0" meta:object-count="0" meta:page-count="2" meta:paragraph-count="26" meta:word-count="721" meta:character-count="5027" meta:non-whitespace-character-count="4330"/>
    <meta:generator>LibreOffice/25.2.5.2$Windows_X86_64 LibreOffice_project/03d19516eb2e1dd5d4ccd751a0d6f35f35e08022</meta:generator>
  </office:meta>
</office:document-meta>
</file>